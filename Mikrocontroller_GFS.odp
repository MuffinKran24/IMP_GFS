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D72984F940.jpg" manifest:media-type="image/jpeg"/>
  <manifest:file-entry manifest:full-path="Pictures/10000001000003C0000002911B436B19.png" manifest:media-type="image/png"/>
  <manifest:file-entry manifest:full-path="Pictures/10000000000002CE00000179D6D28A11.png" manifest:media-type="image/png"/>
  <manifest:file-entry manifest:full-path="Pictures/10000000000003420000029CA37B10DC.png" manifest:media-type="image/png"/>
  <manifest:file-entry manifest:full-path="Pictures/100000000000012C0000012C9C662A2D.jpg" manifest:media-type="image/jpe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1000003E8000003E8B0FCD073.png" manifest:media-type="image/png"/>
  <manifest:file-entry manifest:full-path="Pictures/10000001000001DA000001DA16BADE60.png" manifest:media-type="image/png"/>
  <manifest:file-entry manifest:full-path="Pictures/10000001000000D0000000AF405EAD3C.png" manifest:media-type="image/png"/>
  <manifest:file-entry manifest:full-path="Pictures/10000000000004170000084548F68EEC.jpg" manifest:media-type="image/jpeg"/>
  <manifest:file-entry manifest:full-path="Pictures/100000000000029A000001CCD1F8C34F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000000320000004204666063A.jpg" manifest:media-type="image/jpe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1000001DA000001DAD90AAFA1.png" manifest:media-type="image/png"/>
  <manifest:file-entry manifest:full-path="Pictures/10000000000001F40000014D2E1EA5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16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3cm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4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2cm, 4.942cm, 1.918cm, 4.988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7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8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3" style:family="presentation" style:parent-style-name="Default-outline1" style:list-style-name="L2">
      <style:graphic-properties draw:stroke="none" draw:stroke-dash="Double_20_Dash" svg:stroke-linecap="butt" fo:min-height="8.883cm" loext:decorative="false"/>
      <style:paragraph-properties style:writing-mode="lr-tb"/>
    </style:style>
    <style:style style:name="pr14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5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6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7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8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19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20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21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22" style:family="presentation" style:parent-style-name="Default-outline1" style:list-style-name="L7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23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1.881cm" style:use-optimal-row-height="false"/>
    </style:style>
    <style:style style:name="ro2" style:family="table-row">
      <style:table-row-properties style:row-height="2.249cm" style:use-optimal-row-height="false"/>
    </style:style>
    <style:style style:name="ro3" style:family="table-row">
      <style:table-row-properties style:row-height="2.252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ce3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style:text-properties fo:color="#ffffff" loext:opacity="100%" style:font-name="3270 Nerd Font1"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style:text-properties fo:color="#ffffff" loext:opacity="100%" style:font-name="3270 Nerd Font1" fo:hyphenate="false" loext:hyphenation-no-caps="false" loext:hyphenation-no-last-word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style:font-name="3270 Nerd Font1" fo:hyphenate="false" loext:hyphenation-no-caps="false" loext:hyphenation-no-last-word="false"/>
    </style:style>
    <style:style style:name="P10" style:family="paragraph">
      <loext:graphic-properties draw:fill="none" draw:opacity="68%"/>
      <style:paragraph-properties fo:text-align="center"/>
    </style:style>
    <style:style style:name="P11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12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3" style:family="paragraph">
      <style:text-properties fo:color="#ffffff" loext:opacity="100%" style:font-name="3270 Nerd Font" fo:font-size="22pt"/>
    </style:style>
    <style:style style:name="P14" style:family="paragraph">
      <style:text-properties fo:color="#ffffff" loext:opacity="100%" style:font-name="3270 Nerd Font1" fo:font-size="22pt"/>
    </style:style>
    <style:style style:name="P15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16" style:family="paragraph"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7" style:family="paragraph">
      <loext:graphic-properties draw:fill="none" draw:fill-color="#ffffff"/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8" style:family="paragraph">
      <style:paragraph-properties fo:margin-left="0cm" fo:margin-right="0cm" fo:text-indent="-0.6cm"/>
    </style:style>
    <style:style style:name="P19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0" style:family="paragraph">
      <style:paragraph-properties fo:margin-left="0cm" fo:margin-right="0cm" fo:margin-top="0.42cm" fo:margin-bottom="0.35cm" fo:line-height="100%" fo:text-indent="0cm"/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paragraph-properties fo:margin-top="0.42cm" fo:margin-bottom="0.35cm"/>
      <style:text-properties style:font-name="3270 Nerd Font1" fo:font-size="10pt" style:font-size-asian="10pt" style:font-size-complex="10pt" fo:hyphenate="false" loext:hyphenation-no-caps="false" loext:hyphenation-no-last-word="false"/>
    </style:style>
    <style:style style:name="P22" style:family="paragraph">
      <loext:graphic-properties draw:fill="none" draw:fill-color="#ffffff"/>
      <style:text-properties fo:color="#000000" loext:opacity="100%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25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ffffff" loext:opacity="100%" style:font-name="3270 Nerd Font1"/>
    </style:style>
    <style:style style:name="T4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3270 Nerd Font1"/>
    </style:style>
    <style:style style:name="T7" style:family="text">
      <style:text-properties style:font-name="3270 Nerd Font1" fo:font-weight="bold" style:font-weight-asian="bold" style:font-weight-complex="bold"/>
    </style:style>
    <style:style style:name="T8" style:family="text">
      <style:text-properties style:font-name="3270 Nerd Font1" fo:font-weight="normal" style:font-weight-asian="normal" style:font-weight-complex="normal"/>
    </style:style>
    <style:style style:name="T9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1" style:family="text">
      <style:text-properties fo:color="#ffffff" loext:opacity="100%" style:font-name="3270 Nerd Font" fo:font-size="22pt"/>
    </style:style>
    <style:style style:name="T12" style:family="text">
      <style:text-properties fo:color="#ffffff" loext:opacity="100%" style:font-name="3270 Nerd Font1" fo:font-size="22pt" style:font-size-asian="22pt" style:font-size-complex="2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3270 Nerd Font1" fo:font-size="32pt" style:font-size-asian="32pt" style:font-size-complex="32pt"/>
    </style:style>
    <style:style style:name="T15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6" style:family="text">
      <style:text-properties fo:color="#000000" loext:opacity="100%"/>
    </style:style>
    <style:style style:name="T17" style:family="text">
      <style:text-properties style:font-name="3270 Nerd Font1" fo:font-size="28pt" style:font-size-asian="28pt" style:font-size-complex="28pt"/>
    </style:style>
    <style:style style:name="T18" style:family="text">
      <style:text-properties style:font-name="3270 Nerd Font1" fo:font-size="26pt" style:font-size-asian="26pt" style:font-size-complex="26pt"/>
    </style:style>
    <style:style style:name="T19" style:family="text">
      <style:text-properties style:font-name="3270 Nerd Font1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3270 Nerd Font1" fo:font-size="28pt" fo:font-weight="bold" style:font-size-asian="28pt" style:font-weight-asian="bold" style:font-size-complex="28pt" style:font-weight-complex="bold"/>
    </style:style>
    <style:style style:name="T21" style:family="text">
      <style:text-properties style:font-name="3270 Nerd Font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8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draw:frame draw:style-name="gr1" draw:text-style-name="P2" draw:layer="layout" svg:width="7.669cm" svg:height="0.962cm" svg:x="10.16cm" svg:y="14.278cm">
          <draw:text-box>
            <text:p>Finn Brandt – 19.06.2026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 presentation:user-transformed="true">
          <draw:text-box>
            <text:p><text:span text:style-name="T2">Anwendung</text:span></text:p>
          </draw:text-box>
        </draw:frame>
        <draw:frame presentation:style-name="pr4" draw:text-style-name="P6" draw:layer="layout" svg:width="25.271cm" svg:height="10.921cm" svg:x="1.399cm" svg:y="3.684cm" presentation:class="outline" presentation:user-transformed="true">
          <draw:text-box>
            <text:list text:style-name="L2">
              <text:list-item>
                <text:p xml:id="id1" text:id="id1" text:style-name="P5"><text:span text:style-name="T3">Haushaltsgeräte</text:span></text:p>
              </text:list-item>
              <text:list-item>
                <text:p xml:id="id2" text:id="id2" text:style-name="P5"><text:span text:style-name="T3">Programmierbare Maschinen</text:span></text:p>
              </text:list-item>
              <text:list-item>
                <text:p xml:id="id4" text:id="id4" text:style-name="P5"><text:span text:style-name="T3">Kontrollsysteme</text:span></text:p>
              </text:list-item>
              <text:list-item>
                <text:p xml:id="id7" text:id="id7" text:style-name="P5"><text:span text:style-name="T3">Roboter</text:span></text:p>
              </text:list-item>
              <text:list-item>
                <text:p xml:id="id9" text:id="id9" text:style-name="P5"><text:span text:style-name="T3">Chipkarten</text:span></text:p>
              </text:list-item>
              <text:list-item>
                <text:p xml:id="id10" text:id="id10" text:style-name="P5"><text:span text:style-name="T3">Peripheriegeräte</text:span></text:p>
              </text:list-item>
              <text:list-item>
                <text:p xml:id="id13" text:id="id13" text:style-name="P5"><text:span text:style-name="T4">Eingebettete Systeme</text:span></text:p>
              </text:list-item>
            </text:list>
          </draw:text-box>
        </draw:frame>
        <draw:frame draw:style-name="gr3" draw:text-style-name="P7" xml:id="id8" draw:id="id8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3" draw:text-style-name="P7" xml:id="id11" draw:id="id11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3" draw:text-style-name="P7" xml:id="id3" draw:id="id3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3" draw:text-style-name="P7" xml:id="id5" draw:id="id5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3" draw:text-style-name="P7" xml:id="id6" draw:id="id6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4" draw:text-style-name="P8" draw:layer="layout" svg:width="2.35cm" svg:height="1.115cm" svg:x="25.4cm" svg:y="14.605cm">
          <draw:text-box>
            <text:p xml:id="id12" text:id="id12"><text:span text:style-name="T5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2.629cm" svg:x="1.379cm" svg:y="0.627cm" presentation:class="title" presentation:user-transformed="true">
          <draw:text-box>
            <text:p><text:span text:style-name="T2">Was ist ein Mikrocontroller?</text:span></text:p>
          </draw:text-box>
        </draw:frame>
        <draw:frame presentation:style-name="pr5" draw:text-style-name="P9" draw:layer="layout" svg:width="15.746cm" svg:height="10.921cm" svg:x="1.399cm" svg:y="3.684cm" presentation:class="outline" presentation:user-transformed="true">
          <draw:text-box>
            <text:list text:style-name="L2">
              <text:list-item>
                <text:p xml:id="id14" text:id="id14" text:style-name="P5"><text:span text:style-name="T6">Kleiner Computer</text:span></text:p>
              </text:list-item>
              <text:list-item>
                <text:p xml:id="id15" text:id="id15" text:style-name="P5"><text:span text:style-name="T7">CPU, Arbeitsspeicher und Peripherie auf einem Chip</text:span></text:p>
              </text:list-item>
              <text:list-item>
                <text:p xml:id="id19" text:id="id19" text:style-name="P5"><text:span text:style-name="T8">Heute häufig noch andere Funktionen</text:span><text:span text:style-name="T6"> </text:span></text:p>
              </text:list-item>
            </text:list>
          </draw:text-box>
        </draw:frame>
        <draw:frame draw:style-name="gr5" draw:text-style-name="P10" xml:id="id17" draw:id="id17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5" draw:text-style-name="P10" xml:id="id16" draw:id="id16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frame draw:style-name="gr6" draw:text-style-name="P8" draw:layer="layout" svg:width="1.816cm" svg:height="1.115cm" svg:x="26.026cm" svg:y="14.605cm">
          <draw:text-box>
            <text:p xml:id="id18" text:id="id18"><text:span text:style-name="T5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397cm" svg:x="1.399cm" svg:y="0.243cm" presentation:class="title" presentation:user-transformed="true">
          <draw:text-box>
            <text:p><text:span text:style-name="T9">Was ist der Unterschied zu einem Mikroprozessor?</text:span></text:p>
          </draw:text-box>
        </draw:frame>
        <draw:frame draw:style-name="gr7" draw:layer="layout" svg:width="25.19cm" svg:height="10.882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0">Mikroprozessor (MPU)</text:span></text:p>
              </table:table-cell>
              <table:table-cell>
                <text:p text:style-name="P12"><text:span text:style-name="T10">Mikrocontroller (MCU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1">nur CPU</text:span></text:p>
              </table:table-cell>
              <table:table-cell>
                <text:p text:style-name="P13"><text:span text:style-name="T11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1">hoher Stromverbrauch </text:span></text:p>
                <text:p text:style-name="P13"><text:span text:style-name="T11">(benötigt eine Kühlung)</text:span></text:p>
              </table:table-cell>
              <table:table-cell>
                <text:p text:style-name="P13"><text:span text:style-name="T11">niedriger Stromverbrauch</text:span></text:p>
                <text:p text:style-name="P13"><text:span text:style-name="T11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1">Rechenintensive Anwendungen</text:span></text:p>
              </table:table-cell>
              <table:table-cell>
                <text:p text:style-name="P13"><text:span text:style-name="T11">Steuerung von Geräten</text:span></text:p>
              </table:table-cell>
            </table:table-row>
            <table:table-row table:style-name="ro3">
              <table:table-cell table:style-name="ce3">
                <text:p text:style-name="P14"><text:span text:style-name="T12">teuer: über 100€</text:span></text:p>
              </table:table-cell>
              <table:table-cell table:style-name="ce2">
                <text:p text:style-name="P13"><text:span text:style-name="T11">günstig: ein paar Cent bis wenige Eur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controller</text:span></text:p>
          </draw:text-box>
        </draw:frame>
        <draw:frame presentation:style-name="pr7" draw:text-style-name="P9" draw:layer="layout" svg:width="25.191cm" svg:height="3.936cm" svg:x="1.399cm" svg:y="3.256cm" presentation:class="outline" presentation:user-transformed="true">
          <draw:text-box>
            <text:p text:style-name="P15"><text:span text:style-name="T13">September 1971: Texas Instruments baute den ersten Mikrocontroller, </text:span><text:span text:style-name="T13"><text:line-break/></text:span><text:span text:style-name="T13">den TMS 1802 NC.</text:span></text:p>
          </draw:text-box>
        </draw:frame>
        <draw:frame draw:style-name="gr3" draw:text-style-name="P7" draw:layer="layout" svg:width="7.604cm" svg:height="15.379cm" draw:transform="skewX (0.000174532925199433) rotate (-1.57166899142089) translate (16.021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8" draw:layer="layout" svg:width="1.283cm" svg:height="1.115cm" svg:x="26.67cm" svg:y="14.605cm">
          <draw:text-box>
            <text:p><text:span text:style-name="T5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controller</text:span></text:p>
          </draw:text-box>
        </draw:frame>
        <draw:frame presentation:style-name="pr8" draw:text-style-name="P9" draw:layer="layout" svg:width="25.191cm" svg:height="3.936cm" svg:x="1.399cm" svg:y="3.256cm" presentation:class="outline" presentation:user-transformed="true">
          <draw:text-box>
            <text:p text:style-name="P5"><text:span text:style-name="T14">Der TMS 1802 NC kam danach als Teil der TMS0100 Serie 1974 auf den Markt <text:s/></text:span></text:p>
          </draw:text-box>
        </draw:frame>
        <draw:frame draw:style-name="gr3" draw:text-style-name="P7" draw:layer="layout" svg:width="6.601cm" svg:height="13.346cm" draw:transform="skewX (-0.000174532925199433) rotate (-1.57201805727129) translate (13.97cm 8.639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6" draw:text-style-name="P8" draw:layer="layout" svg:width="1.816cm" svg:height="1.115cm" svg:x="26.67cm" svg:y="14.605cm">
          <draw:text-box>
            <text:p><text:span text:style-name="T5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controller</text:span></text:p>
          </draw:text-box>
        </draw:frame>
        <draw:frame presentation:style-name="pr9" draw:text-style-name="P9" draw:layer="layout" svg:width="11.985cm" svg:height="10.795cm" svg:x="14.605cm" svg:y="3.81cm" presentation:class="outline" presentation:user-transformed="true">
          <draw:text-box>
            <text:list text:style-name="L2">
              <text:list-item>
                <text:p text:style-name="P15"><text:span text:style-name="T14">Damals 20$, <text:s/>heute 165$</text:span></text:p>
              </text:list-item>
              <text:list-item>
                <text:p text:style-name="P5"><text:span text:style-name="T14">4-Bit CPU</text:span></text:p>
              </text:list-item>
              <text:list-item>
                <text:p text:style-name="P15"><text:span text:style-name="T14">300 kHz</text:span></text:p>
              </text:list-item>
              <text:list-item>
                <text:p text:style-name="P5"><text:span text:style-name="T14">182 Bit RAM</text:span></text:p>
              </text:list-item>
            </text:list>
          </draw:text-box>
        </draw:frame>
        <draw:frame draw:style-name="gr3" draw:text-style-name="P7" draw:layer="layout" svg:width="6.59cm" svg:height="13.327cm" draw:transform="skewX (-0.000349065850398866) rotate (-1.57236712312169) translate (13.97cm 8.65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8" draw:layer="layout" svg:width="1.283cm" svg:height="1.115cm" svg:x="26.59cm" svg:y="14.605cm">
          <draw:text-box>
            <text:p><text:span text:style-name="T5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prozessor</text:span></text:p>
          </draw:text-box>
        </draw:frame>
        <draw:frame presentation:style-name="pr10" draw:text-style-name="P16" draw:layer="layout" svg:width="25.271cm" svg:height="3.936cm" svg:x="1.399cm" svg:y="3.269cm" presentation:class="outline" presentation:user-transformed="true">
          <draw:text-box>
            <text:p xml:id="id20" text:id="id20" text:style-name="P5"><text:span text:style-name="T14">November 1971: Der Intel 4004</text:span><text:span text:style-name="T15"> ist der erste Mikroprozessor auf einem einzigen C</text:span><text:span text:style-name="T14">hip</text:span></text:p>
          </draw:text-box>
        </draw:frame>
        <draw:frame draw:style-name="gr3" draw:text-style-name="P7" xml:id="id21" draw:id="id21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2" draw:layer="layout" svg:width="1.283cm" svg:height="1.115cm" svg:x="26.59cm" svg:y="14.605cm">
          <draw:text-box>
            <text:p>[6]</text:p>
          </draw:text-box>
        </draw:frame>
        <draw:frame draw:style-name="gr9" draw:text-style-name="P17" draw:layer="layout" svg:width="12.567cm" svg:height="7.947cm" svg:x="14.103cm" svg:y="6.658cm">
          <draw:text-box>
            <text:list text:style-name="L5">
              <text:list-item>
                <text:p xml:id="id22" text:id="id22" text:style-name="P5"><text:span text:style-name="T14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4-Bit CPU</text:p>
              <text:p>60$ heute ca. 490$</text:p>
              <text:p text:style-name="P18">Man benötigte noch andere Chips wie Speicher und I/O Systeme wodurch ein System 1970 mehrere hundert Dollar kostete was heute mehreren tausend Dollar entsprechen wür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Der erste Mikroprozessor</text:span></text:p>
          </draw:text-box>
        </draw:frame>
        <draw:frame draw:style-name="gr3" draw:text-style-name="P7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2" draw:layer="layout" svg:width="1.283cm" svg:height="1.115cm" svg:x="26.59cm" svg:y="14.605cm">
          <draw:text-box>
            <text:p>[6]</text:p>
          </draw:text-box>
        </draw:frame>
        <draw:frame draw:style-name="gr10" draw:text-style-name="P21" draw:layer="layout" svg:width="12.567cm" svg:height="10.795cm" svg:x="14.103cm" svg:y="3.81cm">
          <draw:text-box>
            <text:list text:style-name="L5">
              <text:list-item>
                <text:p xml:id="id23" text:id="id23" text:style-name="P19"><text:span text:style-name="T14">Damals 60$ heute 480$ </text:span></text:p>
              </text:list-item>
              <text:list-item>
                <text:p xml:id="id24" text:id="id24" text:style-name="P20"><text:span text:style-name="T14">4-Bit CPU</text:span></text:p>
              </text:list-item>
              <text:list-item>
                <text:p text:style-name="P20"><text:span text:style-name="T14">1 Kern</text:span></text:p>
              </text:list-item>
              <text:list-item>
                <text:p text:style-name="P19"><text:span text:style-name="T14">740 - 750 kHz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4-Bit CPU</text:p>
              <text:p>60$ heute 490$</text:p>
              <text:p>740 - 750 kHz</text:p>
              <text:p>1 Kern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Moderne Mikroprozessoren</text:span></text:p>
          </draw:text-box>
        </draw:frame>
        <draw:frame presentation:style-name="pr11" draw:text-style-name="P9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xml:id="id25" text:id="id25" text:style-name="P5"><text:span text:style-name="T6">Januar 2026</text:span></text:p>
              </text:list-item>
              <text:list-item>
                <text:p xml:id="id26" text:id="id26" text:style-name="P5"><text:span text:style-name="T6">490€</text:span></text:p>
              </text:list-item>
              <text:list-item>
                <text:p xml:id="id27" text:id="id27" text:style-name="P15"><text:span text:style-name="T6">64-Bit CPU</text:span></text:p>
              </text:list-item>
              <text:list-item>
                <text:p text:style-name="P5"><text:span text:style-name="T6">8 Kerne</text:span></text:p>
              </text:list-item>
              <text:list-item>
                <text:p text:style-name="P5"><text:span text:style-name="T6">4,7 – 5,6 GHz</text:span></text:p>
              </text:list-item>
            </text:list>
            <text:list text:style-name="L6">
              <text:list-item>
                <text:p text:style-name="P5"><text:span text:style-name="T7"><text:s/>Mehr als 7000-mal schneller</text:span></text:p>
              </text:list-item>
            </text:list>
          </draw:text-box>
        </draw:frame>
        <draw:frame draw:style-name="gr11" draw:text-style-name="P2" draw:layer="layout" svg:width="1.646cm" svg:height="1.115cm" svg:x="26.345cm" svg:y="14.633cm">
          <draw:text-box>
            <text:p>[11]</text:p>
          </draw:text-box>
        </draw:frame>
        <draw:frame draw:style-name="gr12" draw:text-style-name="P7" draw:layer="layout" svg:width="7.619cm" svg:height="8.254cm" svg:x="0.636cm" svg:y="6.985cm">
          <draw:image xlink:href="Pictures/100000000000029A000001CCD1F8C3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Moderne Mikrocontroller</text:span></text:p>
          </draw:text-box>
        </draw:frame>
        <draw:frame presentation:style-name="pr12" draw:text-style-name="P9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text:style-name="P5"><text:span text:style-name="T6">August 2024</text:span></text:p>
              </text:list-item>
              <text:list-item>
                <text:p text:style-name="P5"><text:span text:style-name="T6">1€</text:span></text:p>
              </text:list-item>
              <text:list-item>
                <text:p text:style-name="P5"><text:span text:style-name="T6">32-Bit CPU</text:span></text:p>
              </text:list-item>
              <text:list-item>
                <text:p text:style-name="P5"><text:span text:style-name="T6">150 MHz</text:span></text:p>
              </text:list-item>
              <text:list-item>
                <text:p text:style-name="P5"><text:span text:style-name="T6">520 KB RAM</text:span></text:p>
              </text:list-item>
            </text:list>
          </draw:text-box>
        </draw:frame>
        <draw:frame draw:style-name="gr11" draw:text-style-name="P2" draw:layer="layout" svg:width="1.646cm" svg:height="1.115cm" svg:x="26.345cm" svg:y="14.633cm">
          <draw:text-box>
            <text:p>[12]</text:p>
          </draw:text-box>
        </draw:frame>
        <draw:frame draw:style-name="gr3" draw:text-style-name="P7" draw:layer="layout" svg:width="7.937cm" svg:height="7.937cm" svg:x="0.953cm" svg:y="6.985cm">
          <draw:image xlink:href="Pictures/100000000000012C0000012C9C662A2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Aufbau</text:span></text:p>
          </draw:text-box>
        </draw:frame>
        <draw:frame presentation:style-name="pr13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28" text:id="id28" text:style-name="P5"><text:span text:style-name="T6">Prozessor</text:span></text:p>
              </text:list-item>
              <text:list-item>
                <text:p xml:id="id29" text:id="id29" text:style-name="P5"><text:span text:style-name="T6">RAM (Random-access memory)</text:span></text:p>
              </text:list-item>
              <text:list-item>
                <text:p xml:id="id30" text:id="id30" text:style-name="P5"><text:span text:style-name="T6">ROM (Read-only memory)</text:span></text:p>
              </text:list-item>
              <text:list-item>
                <text:p xml:id="id31" text:id="id31" text:style-name="P5"><text:span text:style-name="T6">A/D Converter</text:span></text:p>
              </text:list-item>
              <text:list-item>
                <text:p xml:id="id32" text:id="id32" text:style-name="P5"><text:span text:style-name="T6">Timer</text:span></text:p>
              </text:list-item>
              <text:list-item>
                <text:p xml:id="id34" text:id="id34" text:style-name="P5"><text:span text:style-name="T6">Interrupts</text:span></text:p>
              </text:list-item>
              <text:list-item>
                <text:p text:style-name="P5"><text:span text:style-name="T6">Bus</text:span></text:p>
              </text:list-item>
            </text:list>
          </draw:text-box>
        </draw:frame>
        <draw:frame draw:style-name="gr8" draw:text-style-name="P8" draw:layer="layout" svg:width="1.283cm" svg:height="1.115cm" svg:x="26.59cm" svg:y="14.605cm">
          <draw:text-box>
            <text:p><text:span text:style-name="T5">[7]</text:span></text:p>
          </draw:text-box>
        </draw:frame>
        <draw:frame draw:style-name="gr3" draw:text-style-name="P7" xml:id="id33" draw:id="id33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3" draw:text-style-name="P7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3" draw:text-style-name="P7" draw:layer="layout" svg:width="29.994cm" svg:height="15.748cm" svg:x="-1.027cm" svg:y="0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1" draw:text-style-name="P22" draw:layer="layout" svg:width="1.646cm" svg:height="1.115cm" svg:x="26.345cm" svg:y="14.125cm">
          <draw:text-box>
            <text:p><text:span text:style-name="T16">[1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Wie funktioniert ein MC</text:span></text:p>
          </draw:text-box>
        </draw:frame>
        <draw:frame presentation:style-name="pr14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35" text:id="id35" text:style-name="P5"><text:span text:style-name="T17">Die CPU liest das Programm aus dem ROM aus</text:span></text:p>
              </text:list-item>
              <text:list-item>
                <text:p xml:id="id36" text:id="id36" text:style-name="P5"><text:span text:style-name="T17">Die CPU decodiert den Befehl</text:span></text:p>
              </text:list-item>
              <text:list-item>
                <text:p xml:id="id37" text:id="id37" text:style-name="P5"><text:span text:style-name="T17">Die CPU führt den Befehl aus</text:span></text:p>
              </text:list-item>
              <text:list-item>
                <text:p xml:id="id38" text:id="id38" text:style-name="P5"><text:span text:style-name="T17">Pro Takt wird ein Befehl ausgeführt</text:span></text:p>
                <text:p text:style-name="P5"><text:span text:style-name="T18">(16 MHz → 16.000.000 Befehle pro Sekund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Was genau macht die CPU</text:span></text:p>
          </draw:text-box>
        </draw:frame>
        <draw:frame presentation:style-name="pr15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5"><text:span text:style-name="T17">Kontrolleinheit: verarbeitet die Befeh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Was genau macht die CPU</text:span></text:p>
          </draw:text-box>
        </draw:frame>
        <draw:frame draw:style-name="gr14" draw:text-style-name="P23" draw:layer="layout" svg:width="15.958cm" svg:height="10.921cm" svg:x="6.015cm" svg:y="3.683cm" presentation:class="graphic" presentation:user-transformed="true">
          <draw:image xlink:href="Pictures/10000001000003C0000002911B436B1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Was genau macht die CPU</text:span></text:p>
          </draw:text-box>
        </draw:frame>
        <draw:frame presentation:style-name="pr16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5"><text:span text:style-name="T17">Kontrolleinheit: verarbeitet die Befehle</text:span></text:p>
              </text:list-item>
              <text:list-item>
                <text:p text:style-name="P19"><text:span text:style-name="T19">Arithmetisch-logische Einheit: führt Berechnungen dur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Was genau macht die CPU</text:span></text:p>
          </draw:text-box>
        </draw:frame>
        <draw:frame draw:style-name="gr14" draw:text-style-name="P23" draw:layer="layout" svg:width="15.958cm" svg:height="10.921cm" svg:x="6.015cm" svg:y="3.683cm" presentation:class="graphic" presentation:user-transformed="true">
          <draw:image xlink:href="Pictures/10000001000003C0000002911B436B1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Was genau macht die CPU</text:span></text:p>
          </draw:text-box>
        </draw:frame>
        <draw:frame presentation:style-name="pr17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5"><text:span text:style-name="T17">Kontrolleinheit: verarbeitet die Befehle</text:span></text:p>
              </text:list-item>
              <text:list-item>
                <text:p text:style-name="P19"><text:span text:style-name="T19">Arithmetisch-logische Einheit: führt Berechnungen durch</text:span></text:p>
              </text:list-item>
              <text:list-item>
                <text:p text:style-name="P19"><text:span text:style-name="T17">Register: extrem schnelle Zwischenspeicher</text:span></text:p>
                <text:p text:style-name="P19"><text:span text:style-name="T1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Was genau macht die CPU</text:span></text:p>
          </draw:text-box>
        </draw:frame>
        <draw:frame draw:style-name="gr14" draw:text-style-name="P23" draw:layer="layout" svg:width="15.958cm" svg:height="10.921cm" svg:x="6.015cm" svg:y="3.683cm" presentation:class="graphic" presentation:user-transformed="true">
          <draw:image xlink:href="Pictures/10000001000003C0000002911B436B1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Was genau macht die CPU</text:span></text:p>
          </draw:text-box>
        </draw:frame>
        <draw:frame presentation:style-name="pr18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5"><text:span text:style-name="T17">Kontrolleinheit: verarbeitet die Befehle</text:span></text:p>
              </text:list-item>
              <text:list-item>
                <text:p text:style-name="P19"><text:span text:style-name="T19">Arithmetisch-logische Einheit: führt Berechnungen durch</text:span></text:p>
              </text:list-item>
              <text:list-item>
                <text:p text:style-name="P19"><text:span text:style-name="T17">Register: extrem schnelle Zwischenspeicher</text:span></text:p>
              </text:list-item>
              <text:list-item>
                <text:p text:style-name="P19"><text:span text:style-name="T20">(</text:span><text:span text:style-name="T17">Clock: erzeugt einen Takt für die CPU</text:span><text:span text:style-name="T20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Programmierung</text:span></text:p>
          </draw:text-box>
        </draw:frame>
        <draw:frame presentation:style-name="pr19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xml:id="id39" text:id="id39" text:style-name="P5"><text:span text:style-name="T6">MC werden in maschinennahen Programmiersprachen programmiert</text:span></text:p>
              </text:list-item>
              <text:list-item>
                <text:p xml:id="id40" text:id="id40" text:style-name="P5"><text:span text:style-name="T6">Direkter Zugriff auf den Speicher</text:span></text:p>
              </text:list-item>
            </text:list>
          </draw:text-box>
        </draw:frame>
        <draw:frame draw:style-name="gr3" draw:text-style-name="P7" xml:id="id41" draw:id="id41" draw:layer="layout" svg:width="3.977cm" svg:height="5.25cm" svg:x="2.373cm" svg:y="8.72cm">
          <draw:image xlink:href="Pictures/1000000000000320000004204666063A.jpg" xlink:type="simple" xlink:show="embed" xlink:actuate="onLoad" draw:mime-type="image/jpeg">
            <text:p/>
          </draw:image>
        </draw:frame>
        <draw:frame draw:style-name="gr3" draw:text-style-name="P7" xml:id="id42" draw:id="id42" draw:layer="layout" svg:width="5.286cm" svg:height="5.253cm" svg:x="7.783cm" svg:y="8.717cm">
          <draw:image xlink:href="Pictures/10000000000001DA000001D72984F94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Programmierung</text:span></text:p>
          </draw:text-box>
        </draw:frame>
        <draw:frame presentation:style-name="pr20" draw:text-style-name="P9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5"><text:span text:style-name="T6">Angepasst an spezifische Entwicklungsboards</text:span></text:p>
              </text:list-item>
            </text:list>
          </draw:text-box>
        </draw:frame>
        <draw:frame draw:style-name="gr3" draw:text-style-name="P7" draw:layer="layout" svg:width="5.206cm" svg:height="5.206cm" svg:x="1.399cm" svg:y="9.399cm">
          <draw:image xlink:href="Pictures/10000001000001DA000001DA16BADE60.png" xlink:type="simple" xlink:show="embed" xlink:actuate="onLoad" draw:mime-type="image/png">
            <text:p/>
          </draw:image>
        </draw:frame>
        <draw:frame draw:style-name="gr3" draw:text-style-name="P7" draw:layer="layout" svg:width="5.715cm" svg:height="5.715cm" svg:x="7.783cm" svg:y="8.89cm">
          <draw:image xlink:href="Pictures/10000001000001DA000001DAD90AAFA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peziell auf bestimmte boards zugeschnitten;</text:p>
              <text:p>C++ mit Bibliotheken</text:p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Mein Projekt</text:span></text:p>
          </draw:text-box>
        </draw:frame>
        <draw:frame presentation:style-name="pr21" draw:text-style-name="P9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43" text:id="id43">Todo: Bild einfü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7">Quellen</text:span></text:p>
          </draw:text-box>
        </draw:frame>
        <draw:frame presentation:style-name="pr22" draw:text-style-name="P9" draw:layer="layout" svg:width="25.32cm" svg:height="10.921cm" svg:x="1.27cm" svg:y="3.684cm" presentation:class="outline" presentation:user-transformed="true">
          <draw:text-box>
            <text:p text:style-name="P24"><text:span text:style-name="T21">- https://en.wikipedia.org/wiki/Microcontroller</text:span></text:p>
            <text:p text:style-name="P24"><text:span text:style-name="T21">- https://en.wikipedia.org/wiki/Microprocessor</text:span></text:p>
            <text:p text:style-name="P24"><text:span text:style-name="T21">- https://en.wikipedia.org/wiki/ATmega328#</text:span></text:p>
            <text:p text:style-name="P24"><text:span text:style-name="T21">- https://ww1.microchip.com/downloads/aemDocuments/documents/MCU08/ProductDocuments/DataSheets/ATmega48A-PA-88A-PA-168A-PA-328-P-DS-DS40002061B.pdf</text:span></text:p>
            <text:p text:style-name="P24"><text:span text:style-name="T21">- https://en.wikipedia.org/wiki/AVR_microcontrollers</text:span></text:p>
            <text:p text:style-name="P24"><text:span text:style-name="T21">- https://web.archive.org/web/20100217065617/http://smithsonianchips.si.edu/augarten/p38.htm</text:span></text:p>
            <text:p text:style-name="P24"><text:span text:style-name="T21">- https://historydraft.com/story/microprocessor/tms-1802nc/425/6336</text:span></text:p>
            <text:p text:style-name="P24"><text:span text:style-name="T21">- https://www.amd.com/en/products/processors/desktops/ryzen/9000-series/amd-ryzen-7-9850x3d.html</text:span></text:p>
            <text:p text:style-name="P24"><text:span text:style-name="T21">- https://en.wikipedia.org/wiki/Intel_4004</text:span></text:p>
            <text:p text:style-name="P24"><text:span text:style-name="T21">- https://en.wikipedia.org/wiki/RP2350</text:span></text:p>
            <text:p text:style-name="P24"><text:span text:style-name="T21">- Taschenbuch Mikroprozessortechnik von Thomas Beierlein und Olaf Hagenbruch</text:span></text:p>
            <text:p text:style-name="P24"><text:span text:style-name="T21">- </text:span></text:p>
            <text:p text:style-name="P24"><text:span text:style-name="T2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3T32">
        <draw:frame presentation:style-name="pr23" draw:text-style-name="P25" draw:layer="layout" svg:width="25.191cm" svg:height="12.19cm" svg:x="1.479cm" svg:y="1.78cm" presentation:class="subtitle" presentation:user-transformed="true">
          <draw:text-box>
            <text:p><text:span text:style-name="T22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6-16T23:43:10.564120248</dc:date>
    <meta:editing-duration>P2DT17H7M34S</meta:editing-duration>
    <meta:editing-cycles>139</meta:editing-cycles>
    <meta:generator>LibreOffice/26.2.3.2$Linux_X86_64 LibreOffice_project/620$Build-2</meta:generator>
    <meta:print-date>2026-04-17T21:49:29.043631534</meta:print-date>
    <meta:document-statistic meta:object-count="155"/>
  </office:meta>
</office:document-meta>
</file>