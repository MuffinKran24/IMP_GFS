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40000014D2E1EA5C9.jpg" manifest:media-type="image/jpeg"/>
  <manifest:file-entry manifest:full-path="Pictures/TablePreview1.svm" manifest:media-type=""/>
  <manifest:file-entry manifest:full-path="Pictures/100000010000032000000320FEFFA616.png" manifest:media-type="image/png"/>
  <manifest:file-entry manifest:full-path="Pictures/10000001000001F4000000EF42899992.png" manifest:media-type="image/png"/>
  <manifest:file-entry manifest:full-path="Pictures/10000000000001F40000014D1BC3E5BD.jpg" manifest:media-type="image/jpeg"/>
  <manifest:file-entry manifest:full-path="Pictures/1000000100000121000001591FC40D0E.png" manifest:media-type="image/png"/>
  <manifest:file-entry manifest:full-path="Pictures/10000001000000D0000000AF405EAD3C.png" manifest:media-type="image/png"/>
  <manifest:file-entry manifest:full-path="Pictures/10000001000003E8000003E8B0FCD073.png" manifest:media-type="image/png"/>
  <manifest:file-entry manifest:full-path="Pictures/10000000000001F4000000C5C6D5A565.jpg" manifest:media-type="image/jpeg"/>
  <manifest:file-entry manifest:full-path="Pictures/10000001000005A0000003461E10DC80.png" manifest:media-type="image/png"/>
  <manifest:file-entry manifest:full-path="Pictures/10000001000002B20000049CBCC6C0EF.png" manifest:media-type="image/png"/>
  <manifest:file-entry manifest:full-path="Pictures/10000000000003420000029CA37B10D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6cm" fo:min-width="2.908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7" style:family="presentation" style:parent-style-name="Default-outline1" style:list-style-name="L5">
      <style:graphic-properties fo:min-height="8.883cm" loext:decorative="false"/>
      <style:paragraph-properties style:writing-mode="lr-tb"/>
    </style:style>
    <style:style style:name="pr8" style:family="presentation" style:parent-style-name="Default-outline1" style:list-style-name="L5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10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5">
      <style:graphic-properties draw:stroke="none" draw:stroke-dash="Double_20_Dash" svg:stroke-linecap="butt" fo:min-height="8.883cm" loext:decorative="false"/>
      <style:paragraph-properties style:writing-mode="lr-tb"/>
    </style:style>
    <style:style style:name="pr13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2.282cm" style:use-optimal-row-height="false"/>
    </style:style>
    <style:style style:name="ro2" style:family="table-row">
      <style:table-row-properties style:row-height="2.729cm" style:use-optimal-row-height="false"/>
    </style:style>
    <style:style style:name="ro3" style:family="table-row">
      <style:table-row-properties style:row-height="2.734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" fo:font-size="22pt"/>
    </style:style>
    <style:style style:name="P1" style:family="paragraph">
      <style:text-properties fo:color="#ffffff" loext:opacity="100%" style:font-name="3270 Nerd Font1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fo:color="#ffffff" loext:opacity="100%" style:font-name="3270 Nerd Font1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style:font-name="3270 Nerd Font1" fo:hyphenate="false" loext:hyphenation-no-caps="false" loext:hyphenation-no-last-word="false"/>
    </style:style>
    <style:style style:name="P9" style:family="paragraph">
      <loext:graphic-properties draw:fill="none" draw:opacity="68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fo:color="#d9d9d9" loext:opacity="100%" style:font-name="3270 Nerd Font1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12" style:family="paragraph">
      <style:paragraph-properties fo:text-align="left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P13" style:family="paragraph">
      <style:text-properties fo:color="#ffffff" loext:opacity="100%" style:font-name="3270 Nerd Font" fo:font-size="22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color="#1d0101" loext:opacity="100%" style:font-name="3270 Nerd Font1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1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ffffff" loext:opacity="100%" style:font-name="3270 Nerd Font1"/>
    </style:style>
    <style:style style:name="T4" style:family="text">
      <style:text-properties fo:color="#ffffff" loext:opacity="100%" style:font-name="3270 Nerd Font1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3270 Nerd Font1"/>
    </style:style>
    <style:style style:name="T7" style:family="text">
      <style:text-properties style:font-name="3270 Nerd Font1" fo:font-weight="bold" style:font-weight-asian="bold" style:font-weight-complex="bold"/>
    </style:style>
    <style:style style:name="T8" style:family="text">
      <style:text-properties style:font-name="3270 Nerd Font1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style:font-name="3270 Nerd Font" fo:font-size="28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style:font-name="3270 Nerd Font" fo:font-size="22pt"/>
    </style:style>
    <style:style style:name="T11" style:family="text">
      <style:text-properties style:font-name="3270 Nerd Font1" fo:font-size="32pt" style:font-size-asian="32pt" style:font-size-complex="32pt"/>
    </style:style>
    <style:style style:name="T12" style:family="text">
      <style:text-properties style:text-line-through-style="none" style:text-line-through-type="none" style:font-name="3270 Nerd Font1" fo:font-size="32pt" style:font-size-asian="32pt" style:font-size-complex="32pt"/>
    </style:style>
    <style:style style:name="T13" style:family="text">
      <style:text-properties style:font-name="3270 Nerd Font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5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4"><text:span text:style-name="T3">Haushaltsgeräte</text:span></text:p>
              </text:list-item>
              <text:list-item>
                <text:p xml:id="id2" text:id="id2" text:style-name="P4"><text:span text:style-name="T3">Programmierbare Maschinen</text:span></text:p>
              </text:list-item>
              <text:list-item>
                <text:p xml:id="id4" text:id="id4" text:style-name="P4"><text:span text:style-name="T3">Kontrollsysteme</text:span></text:p>
              </text:list-item>
              <text:list-item>
                <text:p xml:id="id7" text:id="id7" text:style-name="P4"><text:span text:style-name="T3">Roboter</text:span></text:p>
              </text:list-item>
              <text:list-item>
                <text:p xml:id="id9" text:id="id9" text:style-name="P4"><text:span text:style-name="T3">Chipkarten</text:span></text:p>
              </text:list-item>
              <text:list-item>
                <text:p xml:id="id10" text:id="id10" text:style-name="P4"><text:span text:style-name="T3">Peripheriegeräte</text:span></text:p>
              </text:list-item>
              <text:list-item>
                <text:p xml:id="id13" text:id="id13" text:style-name="P4"><text:span text:style-name="T4">Eingebettete Systeme</text:span></text:p>
              </text:list-item>
            </text:list>
          </draw:text-box>
        </draw:frame>
        <draw:frame draw:style-name="gr2" draw:text-style-name="P6" xml:id="id8" draw:id="id8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3" draw:text-style-name="P7" draw:layer="layout" svg:width="2.267cm" svg:height="0.962cm" svg:x="25.4cm" svg:y="14.605cm">
          <draw:text-box>
            <text:p xml:id="id12" text:id="id12"><text:span text:style-name="T5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7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5" draw:text-style-name="P8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4"><text:span text:style-name="T6">Kleiner Computer</text:span></text:p>
              </text:list-item>
              <text:list-item>
                <text:p xml:id="id15" text:id="id15" text:style-name="P4"><text:span text:style-name="T7">CPU, RAM, ROM und I/O auf einem Chip</text:span><text:span text:style-name="T6"> </text:span></text:p>
              </text:list-item>
            </text:list>
          </draw:text-box>
        </draw:frame>
        <draw:frame draw:style-name="gr4" draw:text-style-name="P9" xml:id="id17" draw:id="id17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4" draw:text-style-name="P9" xml:id="id16" draw:id="id16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custom-shape draw:style-name="gr5" draw:text-style-name="P10" xml:id="id19" draw:id="id19" draw:layer="layout" svg:width="3.408cm" svg:height="1.71cm" svg:x="14.37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xml:id="id20" draw:id="id20" draw:layer="layout" svg:width="3.408cm" svg:height="1.629cm" svg:x="14.372cm" svg:y="3.256cm">
          <draw:image xlink:href="Pictures/10000001000001F4000000EF42899992.png" xlink:type="simple" xlink:show="embed" xlink:actuate="onLoad" draw:mime-type="image/png">
            <text:p/>
          </draw:image>
        </draw:frame>
        <draw:frame draw:style-name="gr6" draw:text-style-name="P7" draw:layer="layout" svg:width="1.738cm" svg:height="0.962cm" svg:x="26.026cm" svg:y="14.605cm">
          <draw:text-box>
            <text:p xml:id="id18" text:id="id18"><text:span text:style-name="T5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1cm" svg:height="3.397cm" svg:x="1.399cm" svg:y="0.243cm" presentation:class="title" presentation:user-transformed="true">
          <draw:text-box>
            <text:p><text:span text:style-name="T8">Was ist der Unterschied zu einem Mikroprozessor?</text:span></text:p>
          </draw:text-box>
        </draw:frame>
        <draw:frame draw:style-name="gr7" draw:layer="layout" svg:width="25.19cm" svg:height="10.473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Mikroprozessor (MPU)</text:span></text:p>
              </table:table-cell>
              <table:table-cell>
                <text:p text:style-name="P12"><text:span text:style-name="T9">Mikrocontroller (MCU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nur CPU</text:span></text:p>
              </table:table-cell>
              <table:table-cell>
                <text:p text:style-name="P13"><text:span text:style-name="T10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Hoher Stromverbrauch </text:span></text:p>
                <text:p text:style-name="P13"><text:span text:style-name="T10">(benötigt eine Kühlung)</text:span></text:p>
              </table:table-cell>
              <table:table-cell>
                <text:p text:style-name="P13"><text:span text:style-name="T10">Niedriger Stromverbrauch</text:span></text:p>
                <text:p text:style-name="P13"><text:span text:style-name="T10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0">Rechenintensive Anwendungen</text:span></text:p>
              </table:table-cell>
              <table:table-cell>
                <text:p text:style-name="P13"><text:span text:style-name="T10">Steuerung von Geräte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7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text:style-name="P4"><text:span text:style-name="T11">Frühe 1970: Der Intel 4004</text:span><text:span text:style-name="T12"> ist der erste Mikroprozessor auf einem C</text:span><text:span text:style-name="T11">hip</text:span></text:p>
              </text:list-item>
            </text:list>
          </draw:text-box>
        </draw:frame>
        <draw:frame draw:style-name="gr8" draw:text-style-name="P14" draw:layer="layout" svg:width="12.395cm" svg:height="8.255cm" svg:x="1.27cm" svg:y="6.98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9" draw:text-style-name="P15" draw:layer="layout" svg:width="1.208cm" svg:height="0.962cm" svg:x="26.59cm" svg:y="14.605cm">
          <draw:text-box>
            <text:p>[6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60$ - heute 477$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Geschichte der Mikrocontroller</text:span></text:p>
          </draw:text-box>
        </draw:frame>
        <draw:frame presentation:style-name="pr8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text:style-name="P4"><text:span text:style-name="T11">Frühe 1970: Der Intel 4004</text:span><text:span text:style-name="T12"> ist der erste Mikroprozessor auf einem C</text:span><text:span text:style-name="T11">hip</text:span></text:p>
              </text:list-item>
            </text:list>
          </draw:text-box>
        </draw:frame>
        <draw:frame draw:style-name="gr9" draw:text-style-name="P15" draw:layer="layout" svg:width="1.208cm" svg:height="0.962cm" svg:x="26.59cm" svg:y="14.605cm">
          <draw:text-box>
            <text:p>[6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60$ - heute 490$</text:p>
              <text:p>Man benötigte noch andere Chips wie Speicher und I/O Systeme wodurch ein System 1970 mehrere hundert Dollar kostete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9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1" text:id="id21" text:style-name="P4"><text:span text:style-name="T6">Prozessor</text:span></text:p>
              </text:list-item>
              <text:list-item>
                <text:p xml:id="id22" text:id="id22" text:style-name="P4"><text:span text:style-name="T6">RAM (Random-access memory)</text:span></text:p>
              </text:list-item>
              <text:list-item>
                <text:p xml:id="id23" text:id="id23" text:style-name="P4"><text:span text:style-name="T6">ROM (Read-only memory)</text:span></text:p>
              </text:list-item>
              <text:list-item>
                <text:p xml:id="id24" text:id="id24" text:style-name="P4"><text:span text:style-name="T6">Oszillator</text:span></text:p>
              </text:list-item>
            </text:list>
          </draw:text-box>
        </draw:frame>
        <draw:frame draw:style-name="gr10" draw:text-style-name="P7" draw:layer="layout" svg:width="1.208cm" svg:height="0.962cm" svg:x="26.59cm" svg:y="14.605cm">
          <draw:text-box>
            <text:p><text:span text:style-name="T5">[7]</text:span></text:p>
          </draw:text-box>
        </draw:frame>
        <draw:frame draw:style-name="gr2" draw:text-style-name="P6" xml:id="id25" draw:id="id25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0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1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Quellen</text:span></text:p>
          </draw:text-box>
        </draw:frame>
        <draw:frame presentation:style-name="pr12" draw:text-style-name="P8" draw:layer="layout" svg:width="24.765cm" svg:height="10.921cm" svg:x="1.825cm" svg:y="3.684cm" presentation:class="outline" presentation:user-transformed="true">
          <draw:text-box>
            <text:p text:style-name="P4"><text:span text:style-name="T6"><text:a xlink:href="https://github.com/MuffinKran24/IMP_GFS/blob/main/Quellen.md" xlink:type="simple">https://github.com/MuffinKran24/IMP_GFS/blob/main/Quellen.md</text:a></text:span><text:span text:style-name="T6"><text:s/></text:span></text:p>
          </draw:text-box>
        </draw:frame>
        <draw:frame draw:style-name="gr10" draw:text-style-name="P7" draw:layer="layout" svg:width="1.208cm" svg:height="0.962cm" svg:x="26.59cm" svg:y="14.605cm">
          <draw:text-box>
            <text:p><text:span text:style-name="T5">[6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32">
        <office:forms form:automatic-focus="false" form:apply-design-mode="false"/>
        <draw:frame presentation:style-name="pr13" draw:text-style-name="P16" draw:layer="layout" svg:width="25.191cm" svg:height="12.19cm" svg:x="1.479cm" svg:y="1.78cm" presentation:class="subtitle" presentation:user-transformed="true">
          <draw:text-box>
            <text:p><text:span text:style-name="T13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5-27T17:18:36.940316695</dc:date>
    <meta:editing-duration>P1DT12H3M32S</meta:editing-duration>
    <meta:editing-cycles>52</meta:editing-cycles>
    <meta:generator>LibreOffice/26.2.3.2$Linux_X86_64 LibreOffice_project/620$Build-2</meta:generator>
    <meta:print-date>2026-04-17T21:49:29.043631534</meta:print-date>
    <meta:document-statistic meta:object-count="80"/>
  </office:meta>
</office:document-meta>
</file>