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181E5A36EB2.jpg" manifest:media-type="image/jpeg"/>
  <manifest:file-entry manifest:full-path="Pictures/10000000000001F40000014D2E1EA5C9.jpg" manifest:media-type="image/jpeg"/>
  <manifest:file-entry manifest:full-path="Pictures/TablePreview1.svm" manifest:media-type=""/>
  <manifest:file-entry manifest:full-path="Pictures/100000010000032000000320FEFFA616.png" manifest:media-type="image/png"/>
  <manifest:file-entry manifest:full-path="Pictures/10000001000001F4000000EF42899992.png" manifest:media-type="image/png"/>
  <manifest:file-entry manifest:full-path="Pictures/10000000000001F40000014D1BC3E5BD.jpg" manifest:media-type="image/jpeg"/>
  <manifest:file-entry manifest:full-path="Pictures/1000000100000121000001591FC40D0E.png" manifest:media-type="image/png"/>
  <manifest:file-entry manifest:full-path="Pictures/10000001000000D0000000AF405EAD3C.png" manifest:media-type="image/png"/>
  <manifest:file-entry manifest:full-path="Pictures/10000001000003E8000003E8B0FCD073.png" manifest:media-type="image/png"/>
  <manifest:file-entry manifest:full-path="Pictures/10000000000001F4000000C5C6D5A565.jpg" manifest:media-type="image/jpeg"/>
  <manifest:file-entry manifest:full-path="Pictures/10000001000005A0000003461E10DC80.png" manifest:media-type="image/png"/>
  <manifest:file-entry manifest:full-path="Pictures/10000001000002B20000049CBCC6C0EF.png" manifest:media-type="image/png"/>
  <manifest:file-entry manifest:full-path="Pictures/10000000000003420000029CA37B10D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3270 Nerd Font1" svg:font-family="'3270 Nerd Font'" style:font-adornments="Regular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7" style:family="presentation" style:parent-style-name="Default-outline1" style:list-style-name="L6">
      <style:graphic-properties fo:min-height="8.883cm" loext:decorative="false"/>
      <style:paragraph-properties style:writing-mode="lr-tb"/>
    </style:style>
    <style:style style:name="pr8" style:family="presentation" style:parent-style-name="Default-outline1" style:list-style-name="L6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10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6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13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2.282cm" style:use-optimal-row-height="false"/>
    </style:style>
    <style:style style:name="ro2" style:family="table-row">
      <style:table-row-properties style:row-height="2.729cm" style:use-optimal-row-height="false"/>
    </style:style>
    <style:style style:name="ro3" style:family="table-row">
      <style:table-row-properties style:row-height="2.734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1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style:text-properties fo:color="#ffffff" loext:opacity="100%" style:font-name="3270 Nerd Fon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fo:color="#ffffff" loext:opacity="100%" style:font-name="3270 Nerd Font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style:font-name="3270 Nerd Font" fo:hyphenate="false" loext:hyphenation-no-caps="false" loext:hyphenation-no-last-word="false"/>
    </style:style>
    <style:style style:name="P9" style:family="paragraph">
      <loext:graphic-properties draw:fill="none" draw:opacity="68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2" style:family="paragraph">
      <style:paragraph-properties fo:text-align="left"/>
      <style:text-properties fo:color="#ffffff" loext:opacity="100%" style:font-name="3270 Nerd Font1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1" fo:font-size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3270 Nerd Font" fo:font-size="32pt" style:font-size-asian="32pt" style:font-size-complex="32pt" fo:hyphenate="false" loext:hyphenation-no-caps="false" loext:hyphenation-no-last-word="false"/>
    </style:style>
    <style:style style:name="P16" style:family="paragraph">
      <style:paragraph-properties fo:text-align="center"/>
    </style:style>
    <style:style style:name="P17" style:family="paragraph">
      <style:text-properties style:font-name="3270 Nerd Font" fo:font-weight="bold" style:font-weight-asian="bold" style:font-weight-complex="bold"/>
    </style:style>
    <style:style style:name="P18" style:family="paragraph">
      <style:paragraph-properties fo:margin-left="0cm" fo:margin-right="0cm" fo:margin-top="0.42cm" fo:margin-bottom="0.35cm" fo:text-align="left" fo:text-indent="0cm"/>
      <style:text-properties fo:font-size="10pt" style:font-size-asian="10pt" style:font-size-complex="10pt" fo:hyphenate="false" loext:hyphenation-no-caps="false" loext:hyphenation-no-last-word="false"/>
    </style:style>
    <style:style style:name="P19" style:family="paragraph">
      <loext:graphic-properties draw:fill-color="#ffffff"/>
      <style:text-properties fo:color="#1d0101" loext:opacity="100%" style:font-name="3270 Nerd Font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ffff" loext:opacity="100%" style:font-name="3270 Nerd Font"/>
    </style:style>
    <style:style style:name="T4" style:family="text">
      <style:text-properties fo:color="#ffffff" loext:opacity="100%" style:font-name="3270 Nerd Font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3270 Nerd Font"/>
    </style:style>
    <style:style style:name="T7" style:family="text">
      <style:text-properties style:font-name="3270 Nerd Font" fo:font-weight="bold" style:font-weight-asian="bold" style:font-weight-complex="bold"/>
    </style:style>
    <style:style style:name="T8" style:family="text">
      <style:text-properties style:font-name="3270 Nerd Font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style:font-name="3270 Nerd Font1" fo:font-size="28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style:font-name="3270 Nerd Font1" fo:font-size="22pt"/>
    </style:style>
    <style:style style:name="T11" style:family="text">
      <style:text-properties style:font-name="3270 Nerd Font" fo:font-size="32pt" style:font-size-asian="32pt" style:font-size-complex="32pt"/>
    </style:style>
    <style:style style:name="T12" style:family="text">
      <style:text-properties style:text-line-through-style="none" style:text-line-through-type="none" style:font-name="3270 Nerd Font" fo:font-size="32pt" style:font-size-asian="32pt" style:font-size-complex="32pt"/>
    </style:style>
    <style:style style:name="T13" style:family="text">
      <style:text-properties style:font-name="3270 Nerd Font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3270 Nerd Font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5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4"><text:span text:style-name="T3">Haushaltsgeräte</text:span></text:p>
              </text:list-item>
              <text:list-item>
                <text:p xml:id="id2" text:id="id2" text:style-name="P4"><text:span text:style-name="T3">Programmierbare Maschinen</text:span></text:p>
              </text:list-item>
              <text:list-item>
                <text:p xml:id="id4" text:id="id4" text:style-name="P4"><text:span text:style-name="T3">Kontrollsysteme</text:span></text:p>
              </text:list-item>
              <text:list-item>
                <text:p xml:id="id7" text:id="id7" text:style-name="P4"><text:span text:style-name="T3">Roboter</text:span></text:p>
              </text:list-item>
              <text:list-item>
                <text:p xml:id="id9" text:id="id9" text:style-name="P4"><text:span text:style-name="T3">Chipkarten</text:span></text:p>
              </text:list-item>
              <text:list-item>
                <text:p xml:id="id10" text:id="id10" text:style-name="P4"><text:span text:style-name="T3">Peripheriegeräte</text:span></text:p>
              </text:list-item>
              <text:list-item>
                <text:p xml:id="id13" text:id="id13" text:style-name="P4"><text:span text:style-name="T4">Eingebettete Systeme</text:span></text:p>
              </text:list-item>
            </text:list>
          </draw:text-box>
        </draw:frame>
        <draw:frame draw:style-name="gr2" draw:text-style-name="P6" xml:id="id8" draw:id="id8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3" draw:text-style-name="P7" draw:layer="layout" svg:width="2.267cm" svg:height="0.962cm" svg:x="25.4cm" svg:y="14.605cm">
          <draw:text-box>
            <text:p xml:id="id12" text:id="id12"><text:span text:style-name="T5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7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5" draw:text-style-name="P8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4"><text:span text:style-name="T6">Kleiner Computer</text:span></text:p>
              </text:list-item>
              <text:list-item>
                <text:p xml:id="id15" text:id="id15" text:style-name="P4"><text:span text:style-name="T7">CPU, RAM, ROM und Peripherie auf einem Chip</text:span><text:span text:style-name="T6"> </text:span></text:p>
              </text:list-item>
            </text:list>
          </draw:text-box>
        </draw:frame>
        <draw:frame draw:style-name="gr4" draw:text-style-name="P9" xml:id="id17" draw:id="id17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4" draw:text-style-name="P9" xml:id="id16" draw:id="id16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5" draw:text-style-name="P10" xml:id="id19" draw:id="id19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0" draw:id="id20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6" draw:text-style-name="P7" draw:layer="layout" svg:width="1.738cm" svg:height="0.962cm" svg:x="26.026cm" svg:y="14.605cm">
          <draw:text-box>
            <text:p xml:id="id18" text:id="id18"><text:span text:style-name="T5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397cm" svg:x="1.399cm" svg:y="0.243cm" presentation:class="title" presentation:user-transformed="true">
          <draw:text-box>
            <text:p><text:span text:style-name="T8">Was ist der Unterschied zu einem Mikroprozessor?</text:span></text:p>
          </draw:text-box>
        </draw:frame>
        <draw:frame draw:style-name="gr7" draw:layer="layout" svg:width="25.19cm" svg:height="10.473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Mikroprozessor (MPU)</text:span></text:p>
              </table:table-cell>
              <table:table-cell>
                <text:p text:style-name="P12"><text:span text:style-name="T9">Mikrocontroller (MCU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nur CPU</text:span></text:p>
              </table:table-cell>
              <table:table-cell>
                <text:p text:style-name="P13"><text:span text:style-name="T10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Hoher Stromverbrauch </text:span></text:p>
                <text:p text:style-name="P13"><text:span text:style-name="T10">(benötigt eine Kühlung)</text:span></text:p>
              </table:table-cell>
              <table:table-cell>
                <text:p text:style-name="P13"><text:span text:style-name="T10">Niedriger Stromverbrauch</text:span></text:p>
                <text:p text:style-name="P13"><text:span text:style-name="T10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0">Rechenintensive Anwendungen</text:span></text:p>
              </table:table-cell>
              <table:table-cell>
                <text:p text:style-name="P13"><text:span text:style-name="T10">Steuerung von Geräte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7" draw:text-style-name="P8" draw:layer="layout" svg:width="25.191cm" svg:height="2.666cm" svg:x="1.399cm" svg:y="3.684cm" presentation:class="outline" presentation:user-transformed="true">
          <draw:text-box>
            <text:list text:style-name="L2">
              <text:list-item>
                <text:p xml:id="id21" text:id="id21" text:style-name="P4"><text:span text:style-name="T11">1971: Der Intel 4004</text:span><text:span text:style-name="T12"> ist der erste Mikroprozessor auf einem einzigen C</text:span><text:span text:style-name="T11">hip</text:span></text:p>
              </text:list-item>
            </text:list>
          </draw:text-box>
        </draw:frame>
        <draw:frame draw:style-name="gr2" draw:text-style-name="P6" xml:id="id22" draw:id="id22" draw:layer="layout" svg:width="12.395cm" svg:height="8.255cm" svg:x="1.27cm" svg:y="6.98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4" draw:layer="layout" svg:width="1.208cm" svg:height="0.962cm" svg:x="26.59cm" svg:y="14.605cm">
          <draw:text-box>
            <text:p>[6]</text:p>
          </draw:text-box>
        </draw:frame>
        <draw:frame draw:style-name="gr9" draw:text-style-name="P15" draw:layer="layout" svg:width="12.567cm" svg:height="7.947cm" svg:x="14.103cm" svg:y="6.658cm">
          <draw:text-box>
            <text:list text:style-name="L4">
              <text:list-item>
                <text:p xml:id="id23" text:id="id23" text:style-name="P4"><text:span text:style-name="T11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60$ - heute 477$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8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4"><text:span text:style-name="T11">1971: Texas Instruments baute den ersten Mikrocontroller, den TMS 1000, der 1974 auf den Markt kam.</text:span></text:p>
              </text:list-item>
            </text:list>
          </draw:text-box>
        </draw:frame>
        <draw:frame draw:style-name="gr8" draw:text-style-name="P14" draw:layer="layout" svg:width="1.208cm" svg:height="0.962cm" svg:x="26.59cm" svg:y="14.605cm">
          <draw:text-box>
            <text:p>[8]</text:p>
          </draw:text-box>
        </draw:frame>
        <draw:frame draw:style-name="gr10" draw:text-style-name="P16" draw:layer="layout" svg:width="8.89cm" svg:height="6.844cm" svg:x="1.27cm" svg:y="8.109cm">
          <draw:image xlink:href="Pictures/10000000000001F400000181E5A36EB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60$ - heute 490$</text:p>
              <text:p>Man benötigte noch andere Chips wie Speicher und I/O Systeme wodurch ein System 1970 mehrere hundert Dollar kostete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9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4" text:id="id24" text:style-name="P4"><text:span text:style-name="T6">Prozessor</text:span></text:p>
              </text:list-item>
              <text:list-item>
                <text:p xml:id="id25" text:id="id25" text:style-name="P4"><text:span text:style-name="T6">RAM (Random-access memory)</text:span></text:p>
              </text:list-item>
              <text:list-item>
                <text:p xml:id="id26" text:id="id26" text:style-name="P4"><text:span text:style-name="T6">ROM (Read-only memory)</text:span></text:p>
              </text:list-item>
              <text:list-item>
                <text:p xml:id="id27" text:id="id27" text:style-name="P4"><text:span text:style-name="T6">Oszillator</text:span></text:p>
              </text:list-item>
            </text:list>
          </draw:text-box>
        </draw:frame>
        <draw:frame draw:style-name="gr8" draw:text-style-name="P7" draw:layer="layout" svg:width="1.208cm" svg:height="0.962cm" svg:x="26.59cm" svg:y="14.605cm">
          <draw:text-box>
            <text:p><text:span text:style-name="T5">[7]</text:span></text:p>
          </draw:text-box>
        </draw:frame>
        <draw:frame draw:style-name="gr2" draw:text-style-name="P6" xml:id="id28" draw:id="id28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0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1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 text:style-name="P17"><text:span text:style-name="T7">Quellen</text:span></text:p>
          </draw:text-box>
        </draw:frame>
        <draw:frame presentation:style-name="pr12" draw:text-style-name="P8" draw:layer="layout" svg:width="25.32cm" svg:height="10.921cm" svg:x="1.27cm" svg:y="3.684cm" presentation:class="outline" presentation:user-transformed="true">
          <draw:text-box>
            <text:p text:style-name="P18"><text:span text:style-name="T13">https://en.wikipedia.org/wiki/Microcontroller</text:span></text:p>
            <text:p text:style-name="P18"><text:span text:style-name="T13">https://en.wikipedia.org/wiki/Microprocessor</text:span></text:p>
            <text:p text:style-name="P18"><text:span text:style-name="T13">https://en.wikipedia.org/wiki/ATmega328#</text:span></text:p>
            <text:p text:style-name="P18"><text:span text:style-name="T13">https://ww1.microchip.com/downloads/aemDocuments/documents/MCU08/ProductDocuments/DataSheets/ATmega48A-PA-88A-PA-168A-PA-328-P-DS-DS40002061B.pdf</text:span></text:p>
            <text:p text:style-name="P18"><text:span text:style-name="T13">https://en.wikipedia.org/wiki/AVR_microcontrollers</text:span></text:p>
            <text:p text:style-name="P18"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32">
        <office:forms form:automatic-focus="false" form:apply-design-mode="false"/>
        <draw:frame presentation:style-name="pr13" draw:text-style-name="P19" draw:layer="layout" svg:width="25.191cm" svg:height="12.19cm" svg:x="1.479cm" svg:y="1.78cm" presentation:class="subtitle" presentation:user-transformed="true">
          <draw:text-box>
            <text:p><text:span text:style-name="T14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3270 Nerd Font1" svg:font-family="'3270 Nerd Font'" style:font-adornments="Regular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5-28T00:49:29.788819163</dc:date>
    <meta:editing-duration>P1DT15H15M36S</meta:editing-duration>
    <meta:editing-cycles>61</meta:editing-cycles>
    <meta:generator>LibreOffice/26.2.3.2$Linux_X86_64 LibreOffice_project/620$Build-2</meta:generator>
    <meta:print-date>2026-04-17T21:49:29.043631534</meta:print-date>
    <meta:document-statistic meta:object-count="81"/>
  </office:meta>
</office:document-meta>
</file>